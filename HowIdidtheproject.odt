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B0000034E68AE47294B8EB5A1.png" manifest:media-type="image/png"/>
  <manifest:file-entry manifest:full-path="Pictures/100000010000072E000001AE842AC5E2C7C20279.png" manifest:media-type="image/png"/>
  <manifest:file-entry manifest:full-path="Pictures/10000001000007350000020A2AE42FA35B48189F.png" manifest:media-type="image/png"/>
  <manifest:file-entry manifest:full-path="Pictures/1000000100000684000003948C2C6D0BCEBB2085.png" manifest:media-type="image/png"/>
  <manifest:file-entry manifest:full-path="Pictures/10000001000003920000010942C0B7A888400B63.png" manifest:media-type="image/png"/>
  <manifest:file-entry manifest:full-path="Pictures/10000001000005B0000002C839B0DC38AADC1F59.png" manifest:media-type="image/png"/>
  <manifest:file-entry manifest:full-path="Pictures/10000001000005FB000002C5E6F04C879BC62794.png" manifest:media-type="image/png"/>
  <manifest:file-entry manifest:full-path="Pictures/10000001000005EF000002BDCF46516BE6CD39F9.png" manifest:media-type="image/png"/>
  <manifest:file-entry manifest:full-path="Pictures/100000010000063F00000346CFE291020F6BD049.png" manifest:media-type="image/png"/>
  <manifest:file-entry manifest:full-path="Pictures/1000000100000392000001096377ED109FCC2313.png" manifest:media-type="image/png"/>
  <manifest:file-entry manifest:full-path="Pictures/1000000100000733000001A9BC20B3A74D8D2DB2.png" manifest:media-type="image/png"/>
  <manifest:file-entry manifest:full-path="Pictures/1000000100000640000004B0138D4BA5C8BE653C.png" manifest:media-type="image/png"/>
  <manifest:file-entry manifest:full-path="Pictures/10000001000005E1000002C093DDA8687D73973F.png" manifest:media-type="image/png"/>
  <manifest:file-entry manifest:full-path="Pictures/10000001000005E1000002B7412CB68727399BA5.png" manifest:media-type="image/png"/>
  <manifest:file-entry manifest:full-path="Pictures/1000000100000600000004AA212FCCA1AF4AEF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0.259cm" table:align="left"/>
    </style:style>
    <style:style style:name="Table1.A" style:family="table-column">
      <style:table-column-properties style:column-width="2.028cm"/>
    </style:style>
    <style:style style:name="Table1.B" style:family="table-column">
      <style:table-column-properties style:column-width="2.572cm"/>
    </style:style>
    <style:style style:name="Table1.C" style:family="table-column">
      <style:table-column-properties style:column-width="5.659cm"/>
    </style:style>
    <style:style style:name="Table1.A1" style:family="table-cell">
      <style:table-cell-properties style:vertical-align="middle" fo:padding="0.049cm" fo:border="none"/>
    </style:style>
    <style:style style:name="P1" style:family="paragraph" style:parent-style-name="Heading_20_3">
      <style:paragraph-properties fo:text-align="justify" style:justify-single-word="false"/>
    </style:style>
    <style:style style:name="P2" style:family="paragraph" style:parent-style-name="Standard">
      <style:paragraph-properties fo:text-align="justify" style:justify-single-word="false"/>
      <style:text-properties officeooo:paragraph-rsid="003695b9"/>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3cd0ba"/>
    </style:style>
    <style:style style:name="P5" style:family="paragraph" style:parent-style-name="Preformatted_20_Text">
      <style:paragraph-properties fo:margin-top="0cm" fo:margin-bottom="0.499cm" style:contextual-spacing="false" style:writing-mode="lr-tb"/>
      <style:text-properties officeooo:paragraph-rsid="003cd0ba"/>
    </style:style>
    <style:style style:name="P6" style:family="paragraph" style:parent-style-name="Standard">
      <style:paragraph-properties fo:text-align="justify" style:justify-single-word="false"/>
      <style:text-properties officeooo:rsid="003d9317" officeooo:paragraph-rsid="003d9317"/>
    </style:style>
    <style:style style:name="P7" style:family="paragraph" style:parent-style-name="Standard">
      <style:paragraph-properties fo:text-align="justify" style:justify-single-word="false"/>
      <style:text-properties fo:font-weight="bold" officeooo:rsid="003d9317" officeooo:paragraph-rsid="003d9317" style:font-weight-asian="bold" style:font-weight-complex="bold"/>
    </style:style>
    <style:style style:name="P8" style:family="paragraph" style:parent-style-name="Text_20_body">
      <style:text-properties fo:font-weight="bold" officeooo:rsid="0071a16a" officeooo:paragraph-rsid="0071a16a" style:font-weight-asian="bold" style:font-weight-complex="bold"/>
    </style:style>
    <style:style style:name="P9" style:family="paragraph" style:parent-style-name="Text_20_body">
      <style:text-properties fo:font-weight="bold" officeooo:rsid="00721819" officeooo:paragraph-rsid="00721819" style:font-weight-asian="bold" style:font-weight-complex="bold"/>
    </style:style>
    <style:style style:name="P10" style:family="paragraph" style:parent-style-name="Text_20_body">
      <style:text-properties officeooo:rsid="003e9800" officeooo:paragraph-rsid="003e9800"/>
    </style:style>
    <style:style style:name="P11" style:family="paragraph" style:parent-style-name="Text_20_body">
      <style:text-properties fo:font-weight="normal" officeooo:rsid="0052183b" officeooo:paragraph-rsid="0052183b" style:font-weight-asian="normal" style:font-weight-complex="normal"/>
    </style:style>
    <style:style style:name="P12" style:family="paragraph" style:parent-style-name="Text_20_body">
      <style:text-properties officeooo:paragraph-rsid="0053f059"/>
    </style:style>
    <style:style style:name="P13" style:family="paragraph" style:parent-style-name="Text_20_body">
      <style:text-properties officeooo:paragraph-rsid="007035c5"/>
    </style:style>
    <style:style style:name="P14" style:family="paragraph" style:parent-style-name="Text_20_body">
      <style:text-properties officeooo:rsid="007035c5" officeooo:paragraph-rsid="007035c5"/>
    </style:style>
    <style:style style:name="P15" style:family="paragraph" style:parent-style-name="Text_20_body">
      <style:text-properties style:text-underline-style="solid" style:text-underline-width="auto" style:text-underline-color="font-color" fo:font-weight="bold" officeooo:rsid="007035c5" officeooo:paragraph-rsid="007035c5" style:font-weight-asian="bold" style:font-weight-complex="bold"/>
    </style:style>
    <style:style style:name="P16" style:family="paragraph" style:parent-style-name="Text_20_body">
      <style:text-properties officeooo:rsid="0071a16a" officeooo:paragraph-rsid="0071a16a"/>
    </style:style>
    <style:style style:name="P17" style:family="paragraph" style:parent-style-name="Text_20_body">
      <style:text-properties officeooo:rsid="0071a16a" officeooo:paragraph-rsid="00730491"/>
    </style:style>
    <style:style style:name="P18" style:family="paragraph" style:parent-style-name="Text_20_body">
      <style:text-properties fo:font-style="italic" fo:font-weight="bold" officeooo:rsid="0071a16a" officeooo:paragraph-rsid="0071a16a" style:font-style-asian="italic" style:font-weight-asian="bold" style:font-style-complex="italic" style:font-weight-complex="bold"/>
    </style:style>
    <style:style style:name="P19" style:family="paragraph" style:parent-style-name="Text_20_body">
      <style:text-properties fo:font-style="italic" fo:font-weight="bold" officeooo:rsid="0071a16a" officeooo:paragraph-rsid="00730491" style:font-style-asian="italic" style:font-weight-asian="bold" style:font-style-complex="italic" style:font-weight-complex="bold"/>
    </style:style>
    <style:style style:name="P20" style:family="paragraph" style:parent-style-name="Text_20_body">
      <style:text-properties fo:font-style="italic" fo:font-weight="bold" style:font-style-asian="italic" style:font-weight-asian="bold" style:font-style-complex="italic" style:font-weight-complex="bold"/>
    </style:style>
    <style:style style:name="P21" style:family="paragraph" style:parent-style-name="Text_20_body">
      <style:text-properties fo:font-style="italic" style:text-underline-style="solid" style:text-underline-width="auto" style:text-underline-color="font-color" fo:font-weight="bold" officeooo:rsid="0071a16a" officeooo:paragraph-rsid="0071a16a" style:font-style-asian="italic" style:font-weight-asian="bold" style:font-style-complex="italic" style:font-weight-complex="bold"/>
    </style:style>
    <style:style style:name="P22" style:family="paragraph" style:parent-style-name="Text_20_body">
      <style:text-properties fo:font-style="italic" style:text-underline-style="solid" style:text-underline-width="auto" style:text-underline-color="font-color" fo:font-weight="bold" officeooo:rsid="0075ffdf" officeooo:paragraph-rsid="008c47e9" style:font-style-asian="italic" style:font-weight-asian="bold" style:font-style-complex="italic" style:font-weight-complex="bold"/>
    </style:style>
    <style:style style:name="P23" style:family="paragraph" style:parent-style-name="Text_20_body">
      <style:text-properties fo:font-style="italic" fo:font-weight="normal" officeooo:rsid="00730491" officeooo:paragraph-rsid="0074b672" style:font-style-asian="italic" style:font-weight-asian="normal" style:font-style-complex="italic" style:font-weight-complex="normal"/>
    </style:style>
    <style:style style:name="P24" style:family="paragraph" style:parent-style-name="Text_20_body">
      <style:text-properties fo:font-style="italic" fo:font-weight="normal" officeooo:rsid="00730491" officeooo:paragraph-rsid="007db493" style:font-style-asian="italic" style:font-weight-asian="normal" style:font-style-complex="italic" style:font-weight-complex="normal"/>
    </style:style>
    <style:style style:name="P25" style:family="paragraph" style:parent-style-name="Heading_20_3" style:list-style-name="L2">
      <style:paragraph-properties fo:text-align="justify" style:justify-single-word="false"/>
      <style:text-properties officeooo:paragraph-rsid="003695b9"/>
    </style:style>
    <style:style style:name="P26" style:family="paragraph" style:parent-style-name="Standard" style:list-style-name="L2">
      <style:paragraph-properties fo:text-align="justify" style:justify-single-word="false"/>
    </style:style>
    <style:style style:name="P27" style:family="paragraph" style:parent-style-name="Standard" style:list-style-name="L2">
      <style:paragraph-properties fo:text-align="justify" style:justify-single-word="false"/>
      <style:text-properties officeooo:paragraph-rsid="003695b9"/>
    </style:style>
    <style:style style:name="P28" style:family="paragraph" style:parent-style-name="Standard" style:list-style-name="L4">
      <style:paragraph-properties fo:text-align="justify" style:justify-single-word="false"/>
      <style:text-properties officeooo:paragraph-rsid="003d9317"/>
    </style:style>
    <style:style style:name="P29" style:family="paragraph" style:parent-style-name="Text_20_body" style:list-style-name="L1"/>
    <style:style style:name="P30" style:family="paragraph" style:parent-style-name="Text_20_body" style:list-style-name="L1">
      <style:paragraph-properties fo:margin-top="0cm" fo:margin-bottom="0cm" style:contextual-spacing="false"/>
    </style:style>
    <style:style style:name="P31" style:family="paragraph" style:parent-style-name="Text_20_body" style:list-style-name="L3"/>
    <style:style style:name="P32" style:family="paragraph" style:parent-style-name="Text_20_body" style:list-style-name="L3">
      <style:paragraph-properties fo:margin-top="0cm" fo:margin-bottom="0cm" style:contextual-spacing="false"/>
      <style:text-properties officeooo:paragraph-rsid="003695b9"/>
    </style:style>
    <style:style style:name="P33" style:family="paragraph" style:parent-style-name="Text_20_body" style:list-style-name="L4"/>
    <style:style style:name="P34" style:family="paragraph" style:parent-style-name="Text_20_body" style:list-style-name="L4">
      <style:text-properties officeooo:paragraph-rsid="003f9b8a"/>
    </style:style>
    <style:style style:name="P35" style:family="paragraph" style:parent-style-name="Text_20_body" style:list-style-name="L4">
      <style:paragraph-properties fo:margin-top="0cm" fo:margin-bottom="0cm" style:contextual-spacing="false"/>
    </style:style>
    <style:style style:name="P36" style:family="paragraph" style:parent-style-name="Text_20_body" style:list-style-name="L5"/>
    <style:style style:name="P37" style:family="paragraph" style:parent-style-name="Text_20_body" style:list-style-name="L5">
      <style:paragraph-properties fo:margin-top="0cm" fo:margin-bottom="0cm" style:contextual-spacing="false"/>
    </style:style>
    <style:style style:name="P38" style:family="paragraph" style:parent-style-name="Text_20_body" style:list-style-name="L6"/>
    <style:style style:name="P39" style:family="paragraph" style:parent-style-name="Text_20_body" style:list-style-name="L6">
      <style:paragraph-properties fo:margin-top="0cm" fo:margin-bottom="0cm" style:contextual-spacing="false"/>
    </style:style>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4">
      <style:paragraph-properties fo:margin-top="0cm" fo:margin-bottom="0cm" style:contextual-spacing="false"/>
    </style:style>
    <style:style style:name="P49" style:family="paragraph" style:parent-style-name="Text_20_body" style:list-style-name="L15">
      <style:paragraph-properties fo:margin-top="0cm" fo:margin-bottom="0cm" style:contextual-spacing="false"/>
    </style:style>
    <style:style style:name="P50" style:family="paragraph" style:parent-style-name="Text_20_body" style:list-style-name="L16"/>
    <style:style style:name="P51" style:family="paragraph" style:parent-style-name="Text_20_body" style:list-style-name="L17">
      <style:paragraph-properties fo:margin-top="0cm" fo:margin-bottom="0cm" style:contextual-spacing="false"/>
    </style:style>
    <style:style style:name="P52" style:family="paragraph" style:parent-style-name="Text_20_body" style:list-style-name="L18">
      <style:paragraph-properties fo:margin-top="0cm" fo:margin-bottom="0cm" style:contextual-spacing="false"/>
    </style:style>
    <style:style style:name="P53" style:family="paragraph" style:parent-style-name="Text_20_body" style:list-style-name="L19"/>
    <style:style style:name="P54" style:family="paragraph" style:parent-style-name="Text_20_body" style:list-style-name="L20">
      <style:paragraph-properties fo:margin-top="0cm" fo:margin-bottom="0cm" style:contextual-spacing="false"/>
    </style:style>
    <style:style style:name="P55" style:family="paragraph" style:parent-style-name="Text_20_body" style:list-style-name="L21"/>
    <style:style style:name="P56" style:family="paragraph" style:parent-style-name="Text_20_body" style:list-style-name="L22">
      <style:paragraph-properties fo:margin-top="0cm" fo:margin-bottom="0cm" style:contextual-spacing="false"/>
    </style:style>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text-properties fo:font-style="italic" fo:font-weight="normal" officeooo:rsid="00730491" officeooo:paragraph-rsid="0074b672" style:font-style-asian="italic" style:font-weight-asian="normal" style:font-style-complex="italic" style:font-weight-complex="normal"/>
    </style:style>
    <style:style style:name="P60" style:family="paragraph" style:parent-style-name="Text_20_body">
      <style:text-properties fo:font-style="italic" fo:font-weight="normal" officeooo:rsid="00906493" officeooo:paragraph-rsid="00906493" style:font-style-asian="italic" style:font-weight-asian="normal" style:font-style-complex="italic" style:font-weight-complex="normal"/>
    </style:style>
    <style:style style:name="P61" style:family="paragraph" style:parent-style-name="Text_20_body">
      <style:text-properties fo:font-style="italic" fo:font-weight="normal" officeooo:rsid="00906493" officeooo:paragraph-rsid="0094e62e" style:font-style-asian="italic" style:font-weight-asian="normal" style:font-style-complex="italic" style:font-weight-complex="normal"/>
    </style:style>
    <style:style style:name="P62" style:family="paragraph" style:parent-style-name="Text_20_body">
      <style:text-properties fo:font-style="italic" fo:font-weight="bold" officeooo:rsid="0091ef19" officeooo:paragraph-rsid="0091ef19" style:font-style-asian="italic" style:font-weight-asian="bold" style:font-style-complex="italic" style:font-weight-complex="bold"/>
    </style:style>
    <style:style style:name="P63" style:family="paragraph" style:parent-style-name="Text_20_body">
      <style:text-properties fo:font-style="italic" fo:font-weight="bold" officeooo:rsid="0091ef19" officeooo:paragraph-rsid="0094e62e" style:font-style-asian="italic" style:font-weight-asian="bold" style:font-style-complex="italic" style:font-weight-complex="bold"/>
    </style:style>
    <style:style style:name="T1" style:family="text">
      <style:text-properties officeooo:rsid="0035217e"/>
    </style:style>
    <style:style style:name="T2" style:family="text">
      <style:text-properties officeooo:rsid="003cd0ba"/>
    </style:style>
    <style:style style:name="T3" style:family="text">
      <style:text-properties officeooo:rsid="003d9317"/>
    </style:style>
    <style:style style:name="T4" style:family="text">
      <style:text-properties fo:font-weight="normal" style:font-weight-asian="normal" style:font-weight-complex="normal"/>
    </style:style>
    <style:style style:name="T5" style:family="text">
      <style:text-properties fo:font-weight="normal" officeooo:rsid="003d9317" style:font-weight-asian="normal" style:font-weight-complex="normal"/>
    </style:style>
    <style:style style:name="T6" style:family="text">
      <style:text-properties officeooo:rsid="0053f059"/>
    </style:style>
    <style:style style:name="T7" style:family="text">
      <style:text-properties officeooo:rsid="0054b229"/>
    </style:style>
    <style:style style:name="T8" style:family="text">
      <style:text-properties fo:font-weight="bold" style:font-weight-asian="bold" style:font-weight-complex="bold"/>
    </style:style>
    <style:style style:name="T9" style:family="text">
      <style:text-properties fo:font-weight="bold" officeooo:rsid="0054b229" style:font-weight-asian="bold" style:font-weight-complex="bold"/>
    </style:style>
    <style:style style:name="T10" style:family="text">
      <style:text-properties fo:font-weight="bold" officeooo:rsid="0054f0ca" style:font-weight-asian="bold" style:font-weight-complex="bold"/>
    </style:style>
    <style:style style:name="T11" style:family="text">
      <style:text-properties officeooo:rsid="005a3109"/>
    </style:style>
    <style:style style:name="T12" style:family="text">
      <style:text-properties officeooo:rsid="007035c5"/>
    </style:style>
    <style:style style:name="T13" style:family="text">
      <style:text-properties officeooo:rsid="0071a16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Analog Circuit Design for ECG Signal Processing</text:span></text:h>
      <text:p text:style-name="Text_20_body">The design aims to:</text:p>
      <text:list xml:id="list4149472786" text:style-name="L1">
        <text:list-item>
          <text:p text:style-name="P30"><text:span text:style-name="Strong_20_Emphasis">Amplify the weak ECG signal</text:span> (amplitude: 0.5–5 mV).</text:p>
        </text:list-item>
        <text:list-item>
          <text:p text:style-name="P30"><text:span text:style-name="Strong_20_Emphasis">Filter out unwanted noise</text:span>, including:</text:p>
          <text:list>
            <text:list-item>
              <text:p text:style-name="P30"><text:span text:style-name="Strong_20_Emphasis">Baseline wander</text:span> (low-frequency noise below 0.5 Hz).</text:p>
            </text:list-item>
            <text:list-item>
              <text:p text:style-name="P30"><text:span text:style-name="Strong_20_Emphasis">Power-line interference</text:span> (50 Hz or 60 Hz noise).</text:p>
            </text:list-item>
            <text:list-item>
              <text:p text:style-name="P29"><text:span text:style-name="Strong_20_Emphasis">High-frequency noise</text:span> (e.g., above 100 Hz).</text:p>
            </text:list-item>
          </text:list>
        </text:list-item>
      </text:list>
      <text:p text:style-name="P3">ECG signal can be represented as a sum of sinusoidal and triangular waveforms. Alternatively, you can use a piecewise linear (PWL) source to approximate the shape of the ECG.</text:p>
      <text:p text:style-name="P3"/>
      <text:list xml:id="list3608161210" text:style-name="L2">
        <text:list-item>
          <text:p text:style-name="P26">insert a voltage source </text:p>
        </text:list-item>
        <text:list-item>
          <text:p text:style-name="P26">Right-click the voltage source and set it as <text:span text:style-name="Source_20_Text">PWL</text:span> under the advanced options.</text:p>
        </text:list-item>
        <text:list-item>
          <text:p text:style-name="P27">for a 60 bpm heart rate (cycle = 1 second), the PQRST components might look like this</text:p>
          <text:p text:style-name="P27"/>
          <text:h text:style-name="P25" text:outline-level="3"><text:span text:style-name="Strong_20_Emphasis">PQRST Waveform Values</text:span></text:h>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ime (ms)</text:p>
            </table:table-cell>
            <table:table-cell table:style-name="Table1.A1" office:value-type="string">
              <text:p text:style-name="Table_20_Heading">Voltage (mV)</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0</text:p>
          </table:table-cell>
          <table:table-cell table:style-name="Table1.A1" office:value-type="string">
            <text:p text:style-name="Table_20_Contents">0.0</text:p>
          </table:table-cell>
          <table:table-cell table:style-name="Table1.A1" office:value-type="string">
            <text:p text:style-name="Table_20_Contents">Start of baseline</text:p>
          </table:table-cell>
        </table:table-row>
        <table:table-row>
          <table:table-cell table:style-name="Table1.A1" office:value-type="string">
            <text:p text:style-name="Table_20_Contents">50</text:p>
          </table:table-cell>
          <table:table-cell table:style-name="Table1.A1" office:value-type="string">
            <text:p text:style-name="Table_20_Contents">0.1</text:p>
          </table:table-cell>
          <table:table-cell table:style-name="Table1.A1" office:value-type="string">
            <text:p text:style-name="Table_20_Contents">P wave starts</text:p>
          </table:table-cell>
        </table:table-row>
        <table:table-row>
          <table:table-cell table:style-name="Table1.A1" office:value-type="string">
            <text:p text:style-name="Table_20_Contents">80</text:p>
          </table:table-cell>
          <table:table-cell table:style-name="Table1.A1" office:value-type="string">
            <text:p text:style-name="Table_20_Contents">0.3</text:p>
          </table:table-cell>
          <table:table-cell table:style-name="Table1.A1" office:value-type="string">
            <text:p text:style-name="Table_20_Contents">P wave peak</text:p>
          </table:table-cell>
        </table:table-row>
        <table:table-row>
          <table:table-cell table:style-name="Table1.A1" office:value-type="string">
            <text:p text:style-name="Table_20_Contents">100</text:p>
          </table:table-cell>
          <table:table-cell table:style-name="Table1.A1" office:value-type="string">
            <text:p text:style-name="Table_20_Contents">0.1</text:p>
          </table:table-cell>
          <table:table-cell table:style-name="Table1.A1" office:value-type="string">
            <text:p text:style-name="Table_20_Contents">P wave ends</text:p>
          </table:table-cell>
        </table:table-row>
        <table:table-row>
          <table:table-cell table:style-name="Table1.A1" office:value-type="string">
            <text:p text:style-name="Table_20_Contents">120</text:p>
          </table:table-cell>
          <table:table-cell table:style-name="Table1.A1" office:value-type="string">
            <text:p text:style-name="Table_20_Contents">0.0</text:p>
          </table:table-cell>
          <table:table-cell table:style-name="Table1.A1" office:value-type="string">
            <text:p text:style-name="Table_20_Contents">PR segment (baseline)</text:p>
          </table:table-cell>
        </table:table-row>
        <table:table-row>
          <table:table-cell table:style-name="Table1.A1" office:value-type="string">
            <text:p text:style-name="Table_20_Contents">140</text:p>
          </table:table-cell>
          <table:table-cell table:style-name="Table1.A1" office:value-type="string">
            <text:p text:style-name="Table_20_Contents">-0.1</text:p>
          </table:table-cell>
          <table:table-cell table:style-name="Table1.A1" office:value-type="string">
            <text:p text:style-name="Table_20_Contents">Q dip</text:p>
          </table:table-cell>
        </table:table-row>
        <table:table-row>
          <table:table-cell table:style-name="Table1.A1" office:value-type="string">
            <text:p text:style-name="Table_20_Contents">150</text:p>
          </table:table-cell>
          <table:table-cell table:style-name="Table1.A1" office:value-type="string">
            <text:p text:style-name="Table_20_Contents">1.0</text:p>
          </table:table-cell>
          <table:table-cell table:style-name="Table1.A1" office:value-type="string">
            <text:p text:style-name="Table_20_Contents">R peak</text:p>
          </table:table-cell>
        </table:table-row>
        <table:table-row>
          <table:table-cell table:style-name="Table1.A1" office:value-type="string">
            <text:p text:style-name="Table_20_Contents">160</text:p>
          </table:table-cell>
          <table:table-cell table:style-name="Table1.A1" office:value-type="string">
            <text:p text:style-name="Table_20_Contents">-0.4</text:p>
          </table:table-cell>
          <table:table-cell table:style-name="Table1.A1" office:value-type="string">
            <text:p text:style-name="Table_20_Contents">S dip</text:p>
          </table:table-cell>
        </table:table-row>
        <table:table-row>
          <table:table-cell table:style-name="Table1.A1" office:value-type="string">
            <text:p text:style-name="Table_20_Contents">200</text:p>
          </table:table-cell>
          <table:table-cell table:style-name="Table1.A1" office:value-type="string">
            <text:p text:style-name="Table_20_Contents">0.0</text:p>
          </table:table-cell>
          <table:table-cell table:style-name="Table1.A1" office:value-type="string">
            <text:p text:style-name="Table_20_Contents">End of QRS complex (baseline)</text:p>
          </table:table-cell>
        </table:table-row>
        <table:table-row>
          <table:table-cell table:style-name="Table1.A1" office:value-type="string">
            <text:p text:style-name="Table_20_Contents">300</text:p>
          </table:table-cell>
          <table:table-cell table:style-name="Table1.A1" office:value-type="string">
            <text:p text:style-name="Table_20_Contents">0.2</text:p>
          </table:table-cell>
          <table:table-cell table:style-name="Table1.A1" office:value-type="string">
            <text:p text:style-name="Table_20_Contents">T wave starts</text:p>
          </table:table-cell>
        </table:table-row>
        <table:table-row>
          <table:table-cell table:style-name="Table1.A1" office:value-type="string">
            <text:p text:style-name="Table_20_Contents">350</text:p>
          </table:table-cell>
          <table:table-cell table:style-name="Table1.A1" office:value-type="string">
            <text:p text:style-name="Table_20_Contents">0.4</text:p>
          </table:table-cell>
          <table:table-cell table:style-name="Table1.A1" office:value-type="string">
            <text:p text:style-name="Table_20_Contents">T wave peak</text:p>
          </table:table-cell>
        </table:table-row>
        <table:table-row>
          <table:table-cell table:style-name="Table1.A1" office:value-type="string">
            <text:p text:style-name="Table_20_Contents">400</text:p>
          </table:table-cell>
          <table:table-cell table:style-name="Table1.A1" office:value-type="string">
            <text:p text:style-name="Table_20_Contents">0.2</text:p>
          </table:table-cell>
          <table:table-cell table:style-name="Table1.A1" office:value-type="string">
            <text:p text:style-name="Table_20_Contents">T wave ends</text:p>
          </table:table-cell>
        </table:table-row>
        <table:table-row>
          <table:table-cell table:style-name="Table1.A1" office:value-type="string">
            <text:p text:style-name="Table_20_Contents">1000</text:p>
          </table:table-cell>
          <table:table-cell table:style-name="Table1.A1" office:value-type="string">
            <text:p text:style-name="Table_20_Contents">0.0</text:p>
          </table:table-cell>
          <table:table-cell table:style-name="Table1.A1" office:value-type="string">
            <text:p text:style-name="Table_20_Contents">End of cycle</text:p>
          </table:table-cell>
        </table:table-row>
      </table:table>
      <text:p text:style-name="P2"><text:span text:style-name="Source_20_Text"/></text:p>
      <text:p text:style-name="P4"><text:span text:style-name="Source_20_Text"><text:span text:style-name="T2">For 60 bpm</text:span></text:span></text:p>
      <text:p text:style-name="P5"><text:span text:style-name="Source_20_Text">PWL(0m 0 50m 0.1 80m 0.3 100m 0.1 120m 0 140m -0.1 150m 1.0 160m -0.4 200m 0 300m 0.2 350m 0.4 400m 0.2 1000m 0)</text:span></text:p>
      <text:p text:style-name="P5"><draw:frame draw:style-name="fr1" draw:name="Image1" text:anchor-type="char" svg:width="17cm" svg:height="4.808cm" draw:z-index="0"><draw:image xlink:href="Pictures/10000001000007350000020A2AE42FA35B48189F.png" xlink:type="simple" xlink:show="embed" xlink:actuate="onLoad" draw:mime-type="image/png"/></draw:frame><text:span text:style-name="Source_20_Text"/></text:p>
      <text:p text:style-name="P5"><text:soft-page-break/><text:span text:style-name="Source_20_Text"/></text:p>
      <text:p text:style-name="P2"><text:span text:style-name="T1">4. </text:span>Set a transient analysis:</text:p>
      <text:list xml:id="list2772295525" text:style-name="L3">
        <text:list-item>
          <text:p text:style-name="P32">Go to <text:span text:style-name="Source_20_Text">Simulate &gt; Edit Simulation Cmd</text:span>.</text:p>
        </text:list-item>
        <text:list-item>
          <text:p text:style-name="P32">Stop time: <text:span text:style-name="Source_20_Text">2s</text:span> (for two cycles of a 60 bpm heart rate).</text:p>
        </text:list-item>
        <text:list-item>
          <text:p text:style-name="P31">Time step: <text:span text:style-name="Source_20_Text">1ms</text:span> or smaller for high resolution.</text:p>
        </text:list-item>
      </text:list>
      <text:p text:style-name="P10">5. add resistance/load</text:p>
      <text:p text:style-name="P7">Introduction of noise into it</text:p>
      <text:p text:style-name="P7"/>
      <text:p text:style-name="P6"><text:span text:style-name="T4">1. </text:span><text:span text:style-name="Strong_20_Emphasis"><text:span text:style-name="T8">50/60 Hz Power Line Interference.</text:span></text:span></text:p>
      <text:list xml:id="list3682677829" text:style-name="L4">
        <text:list-item>
          <text:p text:style-name="P28"><text:span text:style-name="Strong_20_Emphasis"><text:span text:style-name="T4">Use a sinusoidal voltage source (</text:span></text:span><text:span text:style-name="Strong_20_Emphasis"><text:span text:style-name="Source_20_Text"><text:span text:style-name="T4">SINE</text:span></text:span></text:span><text:span text:style-name="Strong_20_Emphasis"><text:span text:style-name="T4">) with the desired frequency (e.g., 50 Hz or 60 Hz).</text:span></text:span></text:p>
        </text:list-item>
        <text:list-item>
          <text:p text:style-name="P34">Set an amplitude that corresponds to the level of interference you expect (e.g., 0.01 V or 0.05 V depending on how strong the interference should be).</text:p>
          <text:p text:style-name="P34"><text:span text:style-name="Strong_20_Emphasis"><text:span text:style-name="T5"/></text:span></text:p>
        </text:list-item>
        <text:list-item>
          <text:p text:style-name="P34"><text:span text:style-name="Strong_20_Emphasis"><text:span text:style-name="T5">SINE(0 0.05 50)</text:span></text:span></text:p>
          <text:p text:style-name="P34"><text:span text:style-name="Strong_20_Emphasis"><text:span text:style-name="T3">0</text:span></text:span><text:span text:style-name="Strong_20_Emphasis"><text:span text:style-name="T5"> → DC offset (centered at 0V).</text:span></text:span></text:p>
          <text:p text:style-name="P35"><text:span text:style-name="Strong_20_Emphasis">0.05</text:span> → Amplitude (adjust as needed, 50mV peak).</text:p>
          <text:p text:style-name="P33"><text:span text:style-name="Strong_20_Emphasis">50/60 Hz</text:span> → Frequency matching power line interference.</text:p>
        </text:list-item>
      </text:list>
      <text:p text:style-name="P11">to repeat cycle of 1s till 4s(4 cycles)</text:p>
      <text:p text:style-name="Text_20_body"><text:span text:style-name="Strong_20_Emphasis">Periodic Source:</text:span></text:p>
      <text:list xml:id="list4262546041" text:style-name="L5">
        <text:list-item>
          <text:p text:style-name="P37">Ensure that the input source (e.g., pulse or sine wave) is configured to repeat periodically.</text:p>
        </text:list-item>
        <text:list-item>
          <text:p text:style-name="P37">For a <text:span text:style-name="Strong_20_Emphasis">PULSE source</text:span>, set the <text:span text:style-name="Source_20_Text">T</text:span> (period) parameter to match the time of one cycle.</text:p>
        </text:list-item>
        <text:list-item>
          <text:p text:style-name="P36">For a <text:span text:style-name="Strong_20_Emphasis">SIN source</text:span>, set the frequency (<text:span text:style-name="Source_20_Text">F</text:span>) to match the desired repetition.</text:p>
        </text:list-item>
      </text:list>
      <text:p text:style-name="P12"><text:span text:style-name="T6">2.</text:span><text:span text:style-name="T8">Baseline wander </text:span><text:span text:style-name="T9">(</text:span><text:span text:style-name="Strong_20_Emphasis"><text:span text:style-name="T8">0.</text:span></text:span><text:span text:style-name="Strong_20_Emphasis"><text:span text:style-name="T10">1</text:span></text:span><text:span text:style-name="Strong_20_Emphasis"><text:span text:style-name="T8">–0.5 Hz</text:span></text:span><text:span text:style-name="T8">.</text:span><text:span text:style-name="T9">)</text:span></text:p>
      <text:p text:style-name="P12">SINE(0 0.2 0.1) <text:span text:style-name="T7">(offset voltage amplitude frequency)</text:span></text:p>
      <text:p text:style-name="P12">If you are adding <text:span text:style-name="Strong_20_Emphasis">white noise</text:span> with a <text:span text:style-name="Strong_20_Emphasis">BV source</text:span>:</text:p>
      <text:list xml:id="list1715076889" text:style-name="L6">
        <text:list-item>
          <text:p text:style-name="P39">Press <text:span text:style-name="Strong_20_Emphasis">F2</text:span> → Select <text:span text:style-name="Strong_20_Emphasis">BV</text:span>.</text:p>
        </text:list-item>
        <text:list-item>
          <text:p text:style-name="P38">Set the value as:</text:p>
        </text:list-item>
      </text:list>
      <text:p text:style-name="P12">white(0.01)</text:p>
      <text:p text:style-name="P12">Place it near the common node.</text:p>
      <text:list xml:id="list913240481" text:style-name="L7">
        <text:list-item>
          <text:p text:style-name="P40">Connect one terminal to the <text:span text:style-name="Strong_20_Emphasis">common node</text:span> and the other to <text:span text:style-name="Strong_20_Emphasis">ground</text:span>.</text:p>
        </text:list-item>
      </text:list>
      <text:p text:style-name="Text_20_body">Voltage source V3 ,<text:span text:style-name="T11">V2,</text:span>B1 are paralleled making an over-defined circuit matrix. You will need to correct the circuit or add some series resistance."</text:p>
      <text:p text:style-name="Text_20_body">Multiple voltage sources (V3 and B1) are connected in parallel without any series resistance, which creates a conflict in defining the node voltages in the circuit matrix</text:p>
      <text:p text:style-name="Text_20_body"/>
      <text:p text:style-name="Text_20_body"/>
      <text:p text:style-name="Text_20_body"><draw:frame draw:style-name="fr2" draw:name="Image4" text:anchor-type="char" svg:x="-0.82cm" svg:y="-1.711cm" svg:width="17cm" svg:height="4.928cm" draw:z-index="2"><draw:image xlink:href="Pictures/1000000100000392000001096377ED109FCC2313.png" xlink:type="simple" xlink:show="embed" xlink:actuate="onLoad" draw:mime-type="image/png"/></draw:frame><text:soft-page-break/></text:p>
      <text:p text:style-name="Text_20_body"><draw:frame draw:style-name="fr2" draw:name="Image3" text:anchor-type="char" svg:x="-0.582cm" svg:y="0.071cm" svg:width="17cm" svg:height="4.928cm" draw:z-index="1"><draw:image xlink:href="Pictures/10000001000003920000010942C0B7A888400B63.png" xlink:type="simple" xlink:show="embed" xlink:actuate="onLoad" draw:mime-type="image/png"/></draw:frame></text:p>
      <text:p text:style-name="Text_20_body"/>
      <text:h text:style-name="Heading_20_3" text:outline-level="3"><text:span text:style-name="Strong_20_Emphasis">What if Both Sources are Equally Important?</text:span></text:h>
      <text:list xml:id="list1134909" text:style-name="L8">
        <text:list-item>
          <text:p text:style-name="P41">Run <text:span text:style-name="Source_20_Text">.noise</text:span> analysis separately for each source:</text:p>
        </text:list-item>
      </text:list>
      <text:p text:style-name="Text_20_body"/>
      <text:p text:style-name="Text_20_body">.noise V(out) V1 dec 10 1 1Meg</text:p>
      <text:p text:style-name="Text_20_body">.noise V(out) V2 dec 10 1 1Meg</text:p>
      <text:p text:style-name="Text_20_body"/>
      <text:list xml:id="list1102453154" text:style-name="L9">
        <text:list-item>
          <text:p text:style-name="P42">This will give you the output noise contributions for each source independently.</text:p>
        </text:list-item>
      </text:list>
      <text:list xml:id="list1677887599" text:style-name="L10">
        <text:list-item>
          <text:p text:style-name="P43">Analyze the results:</text:p>
        </text:list-item>
      </text:list>
      <text:list xml:id="list3686439578" text:style-name="L11">
        <text:list-item>
          <text:p text:style-name="P44">Compare the results to understand the relative impact of each source on the circuit's noise performance.</text:p>
        </text:list-item>
      </text:list>
      <text:list xml:id="list2493406665" text:style-name="L12">
        <text:list-item>
          <text:p text:style-name="P45">Combine if Necessary:</text:p>
        </text:list-item>
      </text:list>
      <text:list xml:id="list2315398636" text:style-name="L13">
        <text:list-item>
          <text:p text:style-name="P46">If the sources are independent, the total noise is the <text:span text:style-name="Strong_20_Emphasis">square root of the sum of squares</text:span> (RSS) of individual noise contributions.</text:p>
        </text:list-item>
      </text:list>
      <text:p text:style-name="Text_20_body"/>
      <text:p text:style-name="Text_20_body"/>
      <text:p text:style-name="Text_20_body">.noise V(outputnode) V1 oct 10 10 1Meg</text:p>
      <text:p text:style-name="Text_20_body"/>
      <text:p text:style-name="Text_20_body"/>
      <text:p text:style-name="Text_20_body"/>
      <text:p text:style-name="Text_20_body"><text:soft-page-break/></text:p>
      <text:p text:style-name="Text_20_body"/>
      <text:p text:style-name="Text_20_body"><draw:frame draw:style-name="fr1" draw:name="Image2" text:anchor-type="char" svg:width="17cm" svg:height="7.872cm" draw:z-index="3"><draw:image xlink:href="Pictures/10000001000005FB000002C5E6F04C879BC62794.png" xlink:type="simple" xlink:show="embed" xlink:actuate="onLoad" draw:mime-type="image/png"/></draw:frame></text:p>
      <text:p text:style-name="Text_20_body"/>
      <text:p text:style-name="Text_20_body">Yes, the circuit introduces noise through the voltage source labeled B1 with the specification v=white(0.1).</text:p>
      <text:p text:style-name="Text_20_body"/>
      <text:p text:style-name="Text_20_body">Breakdown:</text:p>
      <text:p text:style-name="Text_20_body"/>
      <text:p text:style-name="Text_20_body">1. B1 Source - The white(0.1) indicates a white noise source with an amplitude of 0.1V (RMS).</text:p>
      <text:p text:style-name="Text_20_body"/>
      <text:p text:style-name="Text_20_body"/>
      <text:p text:style-name="Text_20_body">2. Effect on Circuit - This will introduce random noise (white noise) into the circuit, which can be used for testing purposes, such as simulating real-world noise effects on the output</text:p>
      <text:p text:style-name="Text_20_body"/>
      <text:p text:style-name="Text_20_body">Additional Noise Sources:</text:p>
      <text:p text:style-name="Text_20_body"/>
      <text:p text:style-name="Text_20_body">The other sources (V2 and V3) use sine waves:</text:p>
      <text:p text:style-name="Text_20_body"/>
      <text:p text:style-name="Text_20_body">V2: SINE(0 0.5 50) — 50 Hz sine wave with 0.5V peak amplitude.</text:p>
      <text:p text:style-name="Text_20_body"/>
      <text:p text:style-name="Text_20_body">V3: SINE(0 0.5 0.1) — Very low-frequency sine wave (0.1 Hz) with 0.5V peak amplitude.</text:p>
      <text:p text:style-name="Text_20_body"/>
      <text:p text:style-name="Text_20_body"><text:soft-page-break/>These do not introduce noise directly but add periodic signals to the circuit.</text:p>
      <text:p text:style-name="Text_20_body"/>
      <text:p text:style-name="Text_20_body"/>
      <text:p text:style-name="Text_20_body"/>
      <text:p text:style-name="Text_20_body">Conclusion:</text:p>
      <text:p text:style-name="Text_20_body"/>
      <text:p text:style-name="Text_20_body">The explicit noise introduction is via B1 with the white noise definition. It is likely intended to test the circuit's response to noise conditions.</text:p>
      <text:p text:style-name="Text_20_body"/>
      <text:p text:style-name="Text_20_body"/>
      <text:p text:style-name="Text_20_body"/>
      <text:p text:style-name="Text_20_body"/>
      <text:p text:style-name="Text_20_body"/>
      <text:list xml:id="list1485048059" text:style-name="L14">
        <text:list-item>
          <text:p text:style-name="P48">Instrumentation amplifiers, like the <text:span text:style-name="Strong_20_Emphasis">AD620</text:span> or <text:span text:style-name="Strong_20_Emphasis">INA128</text:span>, are designed for <text:span text:style-name="Strong_20_Emphasis">low to moderate gains</text:span> (e.g., 10–100).</text:p>
        </text:list-item>
        <text:list-item>
          <text:p text:style-name="P48">Extremely <text:span text:style-name="Strong_20_Emphasis">high gains</text:span> (e.g., 1000 or more) in a single stage may lead to:</text:p>
          <text:list>
            <text:list-item>
              <text:p text:style-name="P48"><text:span text:style-name="Strong_20_Emphasis">Instability</text:span> due to high-frequency oscillations.</text:p>
            </text:list-item>
            <text:list-item>
              <text:p text:style-name="P48"><text:span text:style-name="Strong_20_Emphasis">Offset errors</text:span> being amplified, distorting the output signal.</text:p>
            </text:list-item>
            <text:list-item>
              <text:p text:style-name="P47"><text:span text:style-name="Strong_20_Emphasis">Limited bandwidth</text:span>, which may cause signal attenuation at higher frequencies.</text:p>
            </text:list-item>
          </text:list>
        </text:list-item>
      </text:list>
      <text:list xml:id="list726574395" text:style-name="L15">
        <text:list-item>
          <text:p text:style-name="P49">In noisy environments, a single high-gain stage could cause the output to <text:span text:style-name="Strong_20_Emphasis">saturate</text:span>, especially in the presence of <text:span text:style-name="Strong_20_Emphasis">baseline drift</text:span> and <text:span text:style-name="Strong_20_Emphasis">power line interference</text:span>.</text:p>
        </text:list-item>
      </text:list>
      <text:list xml:id="list628830709" text:style-name="L16">
        <text:list-item>
          <text:p text:style-name="P50">Distributing the gain across stages prevents early-stage saturation and ensures clean amplification.</text:p>
        </text:list-item>
      </text:list>
      <text:p text:style-name="Text_20_body"/>
      <text:p text:style-name="Text_20_body"/>
      <text:p text:style-name="Text_20_body"/>
      <text:p text:style-name="Text_20_body">-----------------------------------------------------------------------------------------------------------------</text:p>
      <text:list xml:id="list774571213" text:style-name="L17">
        <text:list-item>
          <text:p text:style-name="P51"><text:span text:style-name="Strong_20_Emphasis">Initial IA Gain (10–20):</text:span> Ensures the weak signal is raised above noise without distortion.</text:p>
        </text:list-item>
        <text:list-item>
          <text:p text:style-name="P51"><text:span text:style-name="Strong_20_Emphasis">Filtering Stage:</text:span> Removes noise and unwanted signals.</text:p>
        </text:list-item>
        <text:list-item>
          <text:p text:style-name="P51"><text:span text:style-name="Strong_20_Emphasis">Second-Stage Amplifier (Gain 100–200):</text:span> Provides the remaining gain to bring the signal to the desired level (1–5 V).</text:p>
        </text:list-item>
      </text:list>
      <text:list xml:id="list233345823" text:style-name="L18">
        <text:list-header>
          <text:p text:style-name="P52">Using a <text:span text:style-name="Strong_20_Emphasis">multi-stage amplifier</text:span> approach improves performance, stability, and noise rejection.</text:p>
        </text:list-header>
      </text:list>
      <text:list xml:id="list2191394038" text:style-name="L19">
        <text:list-header>
          <text:p text:style-name="P53">The IA handles <text:span text:style-name="Strong_20_Emphasis">initial gain and noise rejection</text:span>, while subsequent stages provide <text:span text:style-name="Strong_20_Emphasis">filtering and higher amplification</text:span> without degrading signal quality.</text:p>
        </text:list-header>
      </text:list>
      <text:list xml:id="list3480616591" text:style-name="L20">
        <text:list-item>
          <text:p text:style-name="P54">An IA amplifies <text:span text:style-name="Strong_20_Emphasis">common-mode noise</text:span> and <text:span text:style-name="Strong_20_Emphasis">baseline drift</text:span> along with the signal if no filtering is done beforehand.</text:p>
        </text:list-item>
      </text:list>
      <text:list xml:id="list2074141254" text:style-name="L21">
        <text:list-item>
          <text:p text:style-name="P55"><text:soft-page-break/>Splitting the amplification into multiple stages allows filtering between stages, improving <text:span text:style-name="Strong_20_Emphasis">signal-to-noise ratio (SNR)</text:span>.</text:p>
        </text:list-item>
      </text:list>
      <text:p text:style-name="Text_20_body">---------------------------------------------------------------------------------------------------------------------</text:p>
      <text:p text:style-name="P15">PURPOSE OF AMPLIFICATION</text:p>
      <text:p text:style-name="P13"><text:span text:style-name="T12"><text:tab/></text:span><text:span text:style-name="Strong_20_Emphasis">Purpose</text:span>: To enhance weak biological signals for better monitoring, diagnosis, or treatment.</text:p>
      <text:list xml:id="list1717656602" text:style-name="L22">
        <text:list-item>
          <text:p text:style-name="P56"><text:span text:style-name="Strong_20_Emphasis">Application</text:span>: Medical instruments use amplification to process signals like heartbeats (ECG), brain waves (EEG), or electrical impulses in muscles.</text:p>
        </text:list-item>
      </text:list>
      <text:list xml:id="list1809477411" text:style-name="L23">
        <text:list-item>
          <text:p text:style-name="P57"><text:span text:style-name="Strong_20_Emphasis">Examples</text:span>:</text:p>
        </text:list-item>
      </text:list>
      <text:list xml:id="list907242407" text:style-name="L24">
        <text:list-item>
          <text:p text:style-name="P58"><text:span text:style-name="Strong_20_Emphasis">ECG/EEG Machines</text:span>: Amplifying weak electrical signals from the heart or brain to create readable data for diagnosis.</text:p>
        </text:list-item>
      </text:list>
      <text:p text:style-name="P14"><draw:frame draw:style-name="fr2" draw:name="Image6" text:anchor-type="char" svg:x="1.573cm" svg:y="0.787cm" svg:width="14.741cm" svg:height="10.151cm" draw:z-index="4"><draw:image xlink:href="Pictures/1000000100000640000004B0138D4BA5C8BE653C.png" xlink:type="simple" xlink:show="embed" xlink:actuate="onLoad" draw:mime-type="image/png"/></draw:frame><draw:frame draw:style-name="fr2" draw:name="Image17" text:anchor-type="char" svg:x="-0.016cm" svg:y="11.213cm" svg:width="16.249cm" svg:height="8.514cm" draw:z-index="14"><draw:image xlink:href="Pictures/100000010000063F00000346CFE291020F6BD049.png" xlink:type="simple" xlink:show="embed" xlink:actuate="onLoad" draw:mime-type="image/png"/></draw:frame></text:p>
      <text:p text:style-name="Text_20_body"><text:soft-page-break/></text:p>
      <text:p text:style-name="Text_20_body"/>
      <text:p text:style-name="Text_20_body"/>
      <text:p text:style-name="Text_20_body">For a gain of 10, the supply voltages ( and ) depend on the input signal range and the desired output range after amplification.</text:p>
      <text:p text:style-name="Text_20_body">Input Signal</text:p>
      <text:p text:style-name="Text_20_body">ECG signal: 1–5 mV</text:p>
      <text:p text:style-name="Text_20_body">Amplified Output Signal</text:p>
      <text:p text:style-name="Text_20_body">Gain = <text:span text:style-name="T13">10</text:span></text:p>
      <text:p text:style-name="Text_20_body">So, the amplified signal will be in the range: 10–50 mV</text:p>
      <text:p text:style-name="Text_20_body"/>
      <text:p text:style-name="P21">1. Dual-Supply Configuration:</text:p>
      <text:p text:style-name="P16">V+=5V and V-=-5V</text:p>
      <text:p text:style-name="P16"><text:s/>and <text:s/>Suitable for bipolar signals and provides headroom for any DC offset correction.</text:p>
      <text:p text:style-name="P21">2.Higher Supplies (Optional):</text:p>
      <text:p text:style-name="P16">V+ = 12V and V-=-12V</text:p>
      <text:p text:style-name="P16"><text:s/>and <text:s/>can be used if you need more dynamic range for future scaling or filtering stages.</text:p>
      <text:p text:style-name="P16"/>
      <text:p text:style-name="P16">For a gain of 10, the supply voltages ( and ) depend on the input signal range and the desired output range after amplification.</text:p>
      <text:p text:style-name="P16"/>
      <text:p text:style-name="P9">WHAT HAPPENS WHEN MORE VOLTAGE IS SUPPLIED</text:p>
      <text:p text:style-name="P16">Recommendation for Your Circuit:</text:p>
      <text:p text:style-name="P16"/>
      <text:p text:style-name="P16">Start with ±5V or 0–5V (single-supply with virtual ground) and ensure the op-amp supports rail-to-rail operation. You can adjust based on testing results.</text:p>
      <text:p text:style-name="P16">Supplying more voltage than required to an operational amplifier (op-amp) or any electronic circuit can lead to several potential issues, depending on how much excess voltage is provided and the op-amp's specifications. Here’s what can happen:</text:p>
      <text:p text:style-name="P8">1. Damage to the Op-Amp (Overvoltage Damage)</text:p>
      <text:p text:style-name="P16">Absolute Maximum Ratings:</text:p>
      <text:p text:style-name="P16">Every op-amp has a specified maximum supply voltage (e.g., ±15 V or 36 V for single supply).</text:p>
      <text:p text:style-name="P16">Exceeding this value can damage the internal circuitry, causing permanent failure.</text:p>
      <text:p text:style-name="P16"><text:soft-page-break/>Even brief overvoltage conditions can burn out transistors inside the op-amp.</text:p>
      <text:p text:style-name="P16"><text:span text:style-name="T8">2.</text:span> <text:span text:style-name="T8">Overheating</text:span></text:p>
      <text:p text:style-name="P16">Higher supply voltages lead to increased power dissipation (heat generation).</text:p>
      <text:p text:style-name="P16">If the op-amp cannot effectively dissipate this heat, it may lead to thermal runaway or failure.</text:p>
      <text:p text:style-name="P16">This is especially critical in high-gain configurations, where small currents can create large outputs and heat up the device quickly.</text:p>
      <text:p text:style-name="P8">3. Output Saturation</text:p>
      <text:p text:style-name="P16">Higher supply voltages allow the op-amp to handle larger output swings.</text:p>
      <text:p text:style-name="P16">However, if your input signal and gain result in small expected outputs, excessive supply voltage is unnecessary and may cause the output to clip or saturate if the signal exceeds the design range.</text:p>
      <text:p text:style-name="P16">For example, amplifying a 1–5 mV ECG signal by 10 yields 10–50 mV, so a ±12 V supply is excessive and could result in noise dominating the signal.</text:p>
      <text:p text:style-name="P8">4. Increased Noise and Offset Errors</text:p>
      <text:p text:style-name="P16">Operating at unnecessarily high voltages can increase noise levels and offset voltages in sensitive applications like ECG signal processing.</text:p>
      <text:p text:style-name="P16">This can degrade the signal-to-noise ratio (SNR) and affect measurement accuracy.</text:p>
      <text:p text:style-name="P16"/>
      <text:p text:style-name="P8">5. Inefficiency</text:p>
      <text:p text:style-name="P16">Higher supply voltages waste power, which is problematic in battery-powered or portable medical devices.</text:p>
      <text:p text:style-name="P16">It reduces energy efficiency without adding functional benefits.</text:p>
      <text:p text:style-name="P16">Best Practice</text:p>
      <text:p text:style-name="P16"/>
      <text:p text:style-name="P16">1. Match Supply Voltage to Application Needs: Use only the voltage required to ensure proper operation and signal amplification.</text:p>
      <text:p text:style-name="P16">2. Follow the Datasheet: Stay within recommended operating ranges to avoid failures.</text:p>
      <text:p text:style-name="P16">3. Use Rail-to-Rail Op-Amps: If working with low signals, these op-amps allow full-range output swing even with low supply voltages (e.g., 0–5 V).</text:p>
      <text:p text:style-name="P16">4. Test with Lower Voltages First: Start with the lowest acceptable supply voltage and increase if needed.</text:p>
      <text:p text:style-name="P16"/>
      <text:p text:style-name="P16"/>
      <text:p text:style-name="P16"/>
      <text:p text:style-name="P16"/>
      <text:p text:style-name="P17"><text:soft-page-break/></text:p>
      <text:p text:style-name="P17"/>
      <text:p text:style-name="P17"/>
      <text:p text:style-name="P17">------------------------------------------------------------------------------------------------------------</text:p>
      <text:p text:style-name="P19"/>
      <text:p text:style-name="P19">For your ECG example (1–5 mV signal, gain of 10):</text:p>
      <text:p text:style-name="P18"/>
      <text:p text:style-name="P18">A ±5 V or 0–5 V supply is sufficient.</text:p>
      <text:p text:style-name="P18"/>
      <text:p text:style-name="P18">Avoid using ±12 V unless there’s a specific need for higher output swings or filtering <text:s/>stages</text:p>
      <text:p text:style-name="P20"/>
      <text:p text:style-name="P20">------------------------------------------------------------------------------------------------------------------</text:p>
      <text:p text:style-name="P23">In this circuit I used 5v</text:p>
      <text:p text:style-name="P23"/>
      <text:p text:style-name="P23"><draw:frame draw:style-name="fr3" draw:name="Image7" text:anchor-type="char" svg:width="17cm" svg:height="9.335cm" draw:z-index="7"><draw:image xlink:href="Pictures/1000000100000684000003948C2C6D0BCEBB2085.png" xlink:type="simple" xlink:show="embed" xlink:actuate="onLoad" draw:mime-type="image/png"/></draw:frame></text:p>
      <text:p text:style-name="P22"><draw:frame draw:style-name="fr2" draw:name="Image14" text:anchor-type="char" svg:x="-0.399cm" svg:y="1.515cm" svg:width="18.683cm" svg:height="4.923cm" draw:z-index="11"><draw:image xlink:href="Pictures/1000000100000733000001A9BC20B3A74D8D2DB2.png" xlink:type="simple" xlink:show="embed" xlink:actuate="onLoad" draw:mime-type="image/png"/></draw:frame>PLOT ANALYSIS(before passing at outputnode and after passing through 3 op amp)</text:p>
      <text:list xml:id="list2720682242" text:style-name="L25">
        <text:list-item>
          <text:p text:style-name="P59"><draw:frame draw:style-name="fr2" draw:name="Image10" text:anchor-type="char" svg:x="-0.836cm" svg:y="-1.323cm" svg:width="18.604cm" svg:height="8.615cm" draw:z-index="5"><draw:image xlink:href="Pictures/10000001000005FB000002C5E6F04C879BC62794.png" xlink:type="simple" xlink:show="embed" xlink:actuate="onLoad" draw:mime-type="image/png"/></draw:frame><text:soft-page-break/>The signal appears to have higher noise levels spread across a wide frequency range, especially at higher frequencies (&gt;1 kHz).</text:p>
        </text:list-item>
        <text:list-item>
          <text:p text:style-name="P59">The baseline noise floor is higher, suggesting the presence of amplified noise or interference from power line (50/60 Hz) or electronic components.</text:p>
        </text:list-item>
        <text:list-item>
          <text:p text:style-name="P59">Peaks in the high-frequency range may indicate high-frequency noise coupling into the signal.</text:p>
          <text:p text:style-name="P59"/>
        </text:list-item>
        <text:list-item>
          <text:p text:style-name="P59"><draw:frame draw:style-name="fr2" draw:name="Image12" text:anchor-type="char" svg:x="0.199cm" svg:y="-0.118cm" svg:width="17cm" svg:height="7.844cm" draw:z-index="6"><draw:image xlink:href="Pictures/10000001000005EF000002BDCF46516BE6CD39F9.png" xlink:type="simple" xlink:show="embed" xlink:actuate="onLoad" draw:mime-type="image/png"/></draw:frame>The noise floor is lower, indicating better noise rejection and filtering effects after amplification.</text:p>
        </text:list-item>
        <text:list-item>
          <text:p text:style-name="P59">The FFT shows a cleaner frequency spectrum, with reduced interference and suppression of unwanted frequency components above the desired range (typical ECG signals have a bandwidth of 0.05–150 Hz).</text:p>
        </text:list-item>
        <text:list-item>
          <text:p text:style-name="P59">High-frequency noise beyond the ECG range (&gt;1 kHz) has been significantly attenuated, suggesting the instrumentation amplifier effectively filtered out noise while amplifying the desired signal</text:p>
        </text:list-item>
      </text:list>
      <text:p text:style-name="P23"><text:soft-page-break/><text:span text:style-name="Strong_20_Emphasis">The FFT plot shown in the image represents the frequency response of a signal after passing through a high-pass filter.</text:span></text:p>
      <text:p text:style-name="P23"><draw:frame draw:style-name="fr1" draw:name="Image11" text:anchor-type="char" svg:width="17cm" svg:height="3.919cm" draw:z-index="8"><draw:image xlink:href="Pictures/1000000100000733000001A9BC20B3A74D8D2DB2.png" xlink:type="simple" xlink:show="embed" xlink:actuate="onLoad" draw:mime-type="image/png"/></draw:frame><draw:frame draw:style-name="fr1" draw:name="Image5" text:anchor-type="char" svg:width="17cm" svg:height="8.313cm" draw:z-index="9"><draw:image xlink:href="Pictures/10000001000005B0000002C839B0DC38AADC1F59.png" xlink:type="simple" xlink:show="embed" xlink:actuate="onLoad" draw:mime-type="image/png"/></draw:frame><text:span text:style-name="Strong_20_Emphasis">Higher frequencies</text:span>: Signal magnitude increases slightly, then stabilizes with smaller variations, showing that higher frequencies pass through with less attenuation.</text:p>
      <text:p text:style-name="P23"/>
      <text:p text:style-name="P23">To achieve second-stage amplification with a gain of 100, you can configure the second-stage op-amp as either a non-inverting amplifier or an inverting amplifier. Here's a step-by-step guide for both configurations:</text:p>
      <text:p text:style-name="P23"/>
      <text:p text:style-name="P23"/>
      <text:p text:style-name="P23">---</text:p>
      <text:p text:style-name="P23"/>
      <text:p text:style-name="P23">1. Non-Inverting Amplifier (Preferred for ECG Signals)</text:p>
      <text:p text:style-name="P23">Circuit Configuration:</text:p>
      <text:p text:style-name="P23">Gain = 1 + \frac{R_f}{R_g}</text:p>
      <text:p text:style-name="P23">Input Signal (Vin): Connect to the non-inverting input (+) of the op-amp.</text:p>
      <text:p text:style-name="P23">Feedback Resistor (R_f): Connect between the output (Vout) and the inverting input (-).</text:p>
      <text:p text:style-name="P23">Ground Resistor (R_g): Connect between the inverting input (-) and ground.</text:p>
      <text:p text:style-name="P23">Gain Calculation:</text:p>
      <text:p text:style-name="P23">For Gain = 100:</text:p>
      <text:p text:style-name="P23">100 = 1 + \frac{R_f}{R_g}</text:p>
      <text:p text:style-name="P23">Simplify:</text:p>
      <text:p text:style-name="P23">99 = \frac{R_f}{R_g}</text:p>
      <text:p text:style-name="P23"><text:soft-page-break/>Choose R_g = 1 kΩ → Then, R_f = 99 kΩ</text:p>
      <text:p text:style-name="P23">Alternatively, R_g = 10 Ω → Then, R_f = 990 Ω</text:p>
      <text:p text:style-name="P23">Advantages:</text:p>
      <text:p text:style-name="P23">High Input Impedance: Does not load the previous stage.</text:p>
      <text:p text:style-name="P23">Suitable for biomedical signals like ECG, as it avoids phase inversion.</text:p>
      <text:p text:style-name="P24">Easy to cascade with instrumentation amplifiers.</text:p>
      <text:p text:style-name="P24">2. Inverting Amplifier (Alternative Approach)</text:p>
      <text:p text:style-name="P23">Circuit Configuration:Gain = -\frac{R_f}{R_in}</text:p>
      <text:p text:style-name="P23">Input Signal (Vin): Connect to the inverting input (-) through a resistor (R_in).</text:p>
      <text:p text:style-name="P23">Feedback Resistor (R_f): Connect between the output (Vout) and the inverting input (-).</text:p>
      <text:p text:style-name="P23">Non-Inverting Input (+): Connect directly to ground or a reference voltage.</text:p>
      <text:p text:style-name="P23">Gain Calculation:</text:p>
      <text:p text:style-name="P23">For Gain = 100:</text:p>
      <text:p text:style-name="P23">100 = -\frac{R_f}{R_{in}}</text:p>
      <text:p text:style-name="P23">Choose R_in = 1 kΩ → Then, R_f = 100 kΩ</text:p>
      <text:p text:style-name="P23">Alternatively, R_in = 10 Ω → Then, R_f = 1 kΩ</text:p>
      <text:p text:style-name="P23">Disadvantage:</text:p>
      <text:p text:style-name="P23">Phase Inversion: Output is inverted compared to the input.</text:p>
      <text:p text:style-name="P23">Lower input impedance compared to the non-inverting configuration, which may not be ideal for ECG signals.</text:p>
      <text:p text:style-name="P23">3. Additional Considerations:</text:p>
      <text:p text:style-name="P23">A. Power Supply:</text:p>
      <text:p text:style-name="P23">Use dual supply (+V and -V) or single supply with virtual ground based on your amplifier's requirements.</text:p>
      <text:p text:style-name="P23">Ensure that the supply voltage is sufficient to avoid clipping during amplification.</text:p>
      <text:p text:style-name="P23">For ECG, a ±5 V or ±12 V supply is often sufficient.</text:p>
      <text:p text:style-name="P23">B. Noise Filtering:</text:p>
      <text:p text:style-name="P23">Add a low-pass filter at the output with a cutoff frequency around 150 Hz to remove high-frequency noise.</text:p>
      <text:p text:style-name="P23">Include decoupling capacitors (0.1 µF and 10 µF) near the power supply pins to suppress supply noise.</text:p>
      <text:p text:style-name="P23">C. Cascading Stages:</text:p>
      <text:p text:style-name="P23"><text:soft-page-break/>If the first stage provides a lower gain (e.g., 10), you can cascade the second stage for additional gain.</text:p>
      <text:p text:style-name="P23">Ensure the total gain does not saturate the op-amp output (stay within the supply limits).</text:p>
      <text:p text:style-name="P23">4. Example LTspice Simulation Settings:</text:p>
      <text:p text:style-name="P23">Configure the second stage op-amp in LTspice using the non-inverting topology.</text:p>
      <text:p text:style-name="P23">Use VSOURCE for the ECG input signal (~1–5 mV).</text:p>
      <text:p text:style-name="P23">Verify output waveform and adjust resistors (R_f and R_g) for precise gain.</text:p>
      <text:p text:style-name="P23">Add noise sources (like 50 Hz interference) to test robustness.</text:p>
      <text:p text:style-name="P23">Final Notes:</text:p>
      <text:p text:style-name="P23">For ECG signals, the non-inverting amplifier is preferred due to its high input impedance and phase-preserving behavior.</text:p>
      <text:p text:style-name="P23">Test the circuit in LTspice before implementation to verify signal quality and gain.</text:p>
      <text:p text:style-name="P23">Ensure the op-amp bandwidth supports frequencies up to 150 Hz without distortion</text:p>
      <text:p text:style-name="P23"><draw:frame draw:style-name="fr2" draw:name="Image13" text:anchor-type="char" svg:x="0.226cm" svg:y="0.191cm" svg:width="17cm" svg:height="7.952cm" draw:z-index="10"><draw:image xlink:href="Pictures/10000001000005E1000002C093DDA8687D73973F.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draw:frame draw:style-name="fr1" draw:name="Image9" text:anchor-type="char" svg:width="17cm" svg:height="13.215cm" draw:z-index="16"><draw:image xlink:href="Pictures/1000000100000600000004AA212FCCA1AF4AEF2D.png" xlink:type="simple" xlink:show="embed" xlink:actuate="onLoad" draw:mime-type="image/png"/></draw:frame><text:soft-page-break/></text:p>
      <text:p text:style-name="P60"/>
      <text:p text:style-name="P60"/>
      <text:p text:style-name="P60"/>
      <text:p text:style-name="P60"/>
      <text:p text:style-name="P60"/>
      <text:p text:style-name="P60"/>
      <text:p text:style-name="P60"/>
      <text:p text:style-name="P62"/>
      <text:p text:style-name="P62"><draw:frame draw:style-name="fr2" draw:name="Image15" text:anchor-type="char" svg:x="-1.693cm" svg:y="4.745cm" svg:width="17cm" svg:height="7.849cm" draw:z-index="12"><draw:image xlink:href="Pictures/10000001000005E1000002B7412CB68727399BA5.png" xlink:type="simple" xlink:show="embed" xlink:actuate="onLoad" draw:mime-type="image/png"/></draw:frame><text:soft-page-break/></text:p>
      <text:p text:style-name="P63"/>
      <text:p text:style-name="P63"/>
      <text:p text:style-name="P61"/>
      <text:p text:style-name="P61">final node</text:p>
      <text:p text:style-name="P63"/>
      <text:p text:style-name="P63"/>
      <text:p text:style-name="P63"><draw:frame draw:style-name="fr2" draw:name="Image8" text:anchor-type="char" svg:x="-1.048cm" svg:y="5.293cm" svg:width="17cm" svg:height="7.77cm" draw:z-index="15"><draw:image xlink:href="Pictures/100000010000073B0000034E68AE47294B8EB5A1.png" xlink:type="simple" xlink:show="embed" xlink:actuate="onLoad" draw:mime-type="image/png"/></draw:frame><draw:frame draw:style-name="fr2" draw:name="Image16" text:anchor-type="char" svg:x="-0.741cm" svg:y="1.111cm" svg:width="17cm" svg:height="3.976cm" draw:z-index="13"><draw:image xlink:href="Pictures/100000010000072E000001AE842AC5E2C7C20279.png" xlink:type="simple" xlink:show="embed" xlink:actuate="onLoad" draw:mime-type="image/png"/></draw:frame>simulations at all specific nodes togeth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6:23:57.416635905</meta:creation-date>
    <meta:editing-duration>PT6H59M12S</meta:editing-duration>
    <meta:editing-cycles>10</meta:editing-cycles>
    <meta:generator>LibreOffice/7.3.7.2$Linux_X86_64 LibreOffice_project/30$Build-2</meta:generator>
    <dc:date>2025-01-08T20:09:35.995671994</dc:date>
    <meta:document-statistic meta:table-count="1" meta:image-count="17" meta:object-count="0" meta:page-count="15" meta:paragraph-count="238" meta:word-count="2199" meta:character-count="13703" meta:non-whitespace-character-count="11801"/>
  </office:meta>
</office:document-meta>
</file>